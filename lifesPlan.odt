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rsid="0019b7d3" officeooo:paragraph-rsid="0019b7d3"/>
    </style:style>
    <style:style style:name="P3" style:family="paragraph" style:parent-style-name="Text_20_body" style:list-style-name="L1">
      <style:text-properties officeooo:rsid="0019b7d3" officeooo:paragraph-rsid="0019b7d3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19b7d3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rsid="0019b7d3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officeooo:rsid="0019b7d3"/>
    </style:style>
    <style:style style:name="P7" style:family="paragraph" style:parent-style-name="Text_20_body" style:list-style-name="L4">
      <style:paragraph-properties fo:margin-top="0in" fo:margin-bottom="0in" style:contextual-spacing="false"/>
      <style:text-properties officeooo:rsid="0019b7d3"/>
    </style:style>
    <style:style style:name="P8" style:family="paragraph" style:parent-style-name="Text_20_body" style:list-style-name="L5">
      <style:text-properties officeooo:rsid="0019b7d3"/>
    </style:style>
    <style:style style:name="P9" style:family="paragraph" style:parent-style-name="Heading_20_2">
      <style:text-properties officeooo:rsid="0019b7d3" officeooo:paragraph-rsid="0019b7d3"/>
    </style:style>
    <style:style style:name="P10" style:family="paragraph" style:parent-style-name="Text_20_body">
      <style:text-properties officeooo:rsid="0019b7d3"/>
    </style:style>
    <style:style style:name="P11" style:family="paragraph" style:parent-style-name="Text_20_body" style:list-style-name="L6">
      <style:paragraph-properties fo:margin-top="0in" fo:margin-bottom="0in" style:contextual-spacing="false"/>
      <style:text-properties officeooo:rsid="0019b7d3"/>
    </style:style>
    <style:style style:name="P12" style:family="paragraph" style:parent-style-name="Text_20_body" style:list-style-name="L6">
      <style:text-properties officeooo:rsid="0019b7d3"/>
    </style:style>
    <style:style style:name="P13" style:family="paragraph" style:parent-style-name="Quotations">
      <style:paragraph-properties fo:margin-top="0in" fo:margin-bottom="0.0972in" style:contextual-spacing="false" fo:line-height="115%"/>
      <style:text-properties officeooo:rsid="0019b7d3"/>
    </style:style>
    <style:style style:name="P14" style:family="paragraph" style:parent-style-name="Text_20_body" style:list-style-name="L7">
      <style:paragraph-properties fo:margin-top="0in" fo:margin-bottom="0in" style:contextual-spacing="false"/>
      <style:text-properties officeooo:rsid="0019b7d3"/>
    </style:style>
    <style:style style:name="P15" style:family="paragraph" style:parent-style-name="Text_20_body" style:list-style-name="L7">
      <style:text-properties officeooo:rsid="0019b7d3"/>
    </style:style>
    <style:style style:name="P16" style:family="paragraph" style:parent-style-name="Text_20_body">
      <style:text-properties officeooo:paragraph-rsid="001cb8e2"/>
    </style:style>
    <style:style style:name="P17" style:family="paragraph" style:parent-style-name="Heading_20_2">
      <style:text-properties officeooo:paragraph-rsid="00127613"/>
    </style:style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Quotations">
      <style:paragraph-properties fo:margin-top="0in" fo:margin-bottom="0.0972in" style:contextual-spacing="false" fo:line-height="115%"/>
    </style:style>
    <style:style style:name="P21" style:family="paragraph" style:parent-style-name="Text_20_body">
      <style:text-properties officeooo:paragraph-rsid="00127613"/>
    </style:style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fo:font-weight="bold" officeooo:rsid="001cb8e2" style:font-weight-asian="bold" style:font-weight-complex="bold"/>
    </style:style>
    <style:style style:name="P27" style:family="paragraph" style:parent-style-name="Text_20_body">
      <style:text-properties fo:font-weight="bold" officeooo:rsid="001cb8e2" style:font-weight-asian="bold" style:font-weight-complex="bold"/>
    </style:style>
    <style:style style:name="P28" style:family="paragraph" style:parent-style-name="Text_20_body">
      <style:text-properties fo:font-weight="bold" officeooo:rsid="001cb8e2" officeooo:paragraph-rsid="001cb8e2" style:font-weight-asian="bold" style:font-weight-complex="bold"/>
    </style:style>
    <style:style style:name="P29" style:family="paragraph" style:parent-style-name="Preformatted_20_Text">
      <style:paragraph-properties fo:margin-top="0in" fo:margin-bottom="0.0972in" style:contextual-spacing="false" fo:line-height="115%"/>
    </style:style>
    <style:style style:name="P30" style:family="paragraph" style:parent-style-name="Horizontal_20_Line">
      <style:paragraph-properties fo:margin-top="0in" fo:margin-bottom="0.0972in" style:contextual-spacing="false" fo:line-height="115%"/>
    </style:style>
    <style:style style:name="P31" style:family="paragraph" style:parent-style-name="Heading_20_1">
      <style:paragraph-properties fo:margin-top="0in" fo:margin-bottom="0.0972in" style:contextual-spacing="false" fo:line-height="115%"/>
    </style:style>
    <style:style style:name="P32" style:family="paragraph" style:parent-style-name="Heading_20_2">
      <style:paragraph-properties fo:margin-top="0in" fo:margin-bottom="0.0972in" style:contextual-spacing="false" fo:line-height="115%"/>
    </style:style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Heading_20_3">
      <style:paragraph-properties fo:margin-top="0in" fo:margin-bottom="0.0972in" style:contextual-spacing="false" fo:line-height="115%"/>
    </style:style>
    <style:style style:name="P53" style:family="paragraph" style:parent-style-name="Text_20_body" style:list-style-name="L30"/>
    <style:style style:name="P54" style:family="paragraph" style:parent-style-name="Text_20_body" style:list-style-name="L31"/>
    <style:style style:name="P55" style:family="paragraph" style:parent-style-name="Text_20_body" style:list-style-name="L32"/>
    <style:style style:name="P56" style:family="paragraph" style:parent-style-name="Text_20_body" style:list-style-name="L33"/>
    <style:style style:name="P57" style:family="paragraph" style:parent-style-name="Text_20_body" style:list-style-name="L34"/>
    <style:style style:name="P58" style:family="paragraph" style:parent-style-name="Text_20_body" style:list-style-name="L35"/>
    <style:style style:name="P59" style:family="paragraph" style:parent-style-name="Text_20_body" style:list-style-name="L36"/>
    <style:style style:name="P60" style:family="paragraph" style:parent-style-name="Text_20_body" style:list-style-name="L37"/>
    <style:style style:name="P61" style:family="paragraph" style:parent-style-name="Text_20_body" style:list-style-name="L38"/>
    <style:style style:name="P62" style:family="paragraph" style:parent-style-name="Text_20_body" style:list-style-name="L39"/>
    <style:style style:name="P63" style:family="paragraph" style:parent-style-name="Text_20_body" style:list-style-name="L40"/>
    <style:style style:name="P64" style:family="paragraph" style:parent-style-name="Heading_20_1">
      <style:paragraph-properties fo:margin-top="0in" fo:margin-bottom="0.0972in" style:contextual-spacing="false" fo:line-height="115%"/>
      <style:text-properties officeooo:paragraph-rsid="001e6243"/>
    </style:style>
    <style:style style:name="P65" style:family="paragraph" style:parent-style-name="Text_20_body" style:list-style-name="L41"/>
    <style:style style:name="P66" style:family="paragraph" style:parent-style-name="Text_20_body" style:list-style-name="L42"/>
    <style:style style:name="T1" style:family="text">
      <style:text-properties officeooo:rsid="00170c9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1cb8e2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b8e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rpEsp (5 - - 6) oração meditação tayoga alimentação consciente</text:p>
      <text:p text:style-name="Text_20_body">estudos(6.5 -- 8 | 17--19) artgs+esaApost -- ars liber olav- mim</text:p>
      <text:p text:style-name="P1">TI+CS --<text:line-break/> <text:s text:c="3"/>Dev Super review<text:line-break/> <text:s text:c="3"/>CS500<text:tab/><text:line-break/> <text:s text:c="3"/><text:span text:style-name="T1">CS </text:span>TI For<text:span text:style-name="T1">m(books+videos+articles)</text:span><text:tab/><text:line-break/> profit<text:line-break/> <text:s text:c="3"/>web-dev<text:line-break/>trading mim<text:line-break/>empreer- mim</text:p>
      <text:p text:style-name="Text_20_body">recursos(...) sistem hidrico<text:span text:style-name="T1">(simples poço artesiano)</text:span> sistem termos<text:span text:style-name="T1">(simples barro+lenha)</text:span> sistem eletros sistem eletrons</text:p>
      <text:p text:style-name="Text_20_body">negocios(8--16 | 20 -- 23) agt comerce frela web dev trading crypto empreer-- soft- smart mapper</text:p>
      <text:p text:style-name="Text_20_body">ProJ(20 -- 23) pessoal Hard area de trabalho escritorio painel extensivo soft Universal Ai assistence system Inf</text:p>
      <text:p text:style-name="P1">patrimonial<text:line-break/> hard<text:line-break/> dronV<text:line-break/> black_lamp<text:line-break/> pt_eltron<text:line-break/> exo_epi<text:line-break/> <text:line-break/> soft.<text:line-break/> smart trade boot<text:line-break/>empresarial<text:line-break/> soft<text:line-break/> smart mapper<text:line-break/> precisium hunted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<text:span text:style-name="T2">competencias…</text:span></text:p>
      <text:list text:style-name="L1">
        <text:list-item>
          <text:p text:style-name="P3"><text:span text:style-name="Strong_20_Emphasis">Análise e Desenvolvimento de Sistemas:</text:span><text:span text:style-name="Strong_20_Emphasis"><text:span text:style-name="T3"> análise de requisitos, modelagem de processos, desenvolvimento de sistemas, APIs, banco de dados, testes e manutenção. </text:span></text:span></text:p>
        </text:list-item>
        <text:list-item>
          <text:p text:style-name="P4"><text:span text:style-name="Strong_20_Emphasis">Engenharia de Software:</text:span> arquitetura, documentação técnica, versionamento, qualidade de código, testes automatizados e evolução de sistemas. </text:p>
        </text:list-item>
      </text:list>
      <text:list text:style-name="L2">
        <text:list-item>
          <text:p text:style-name="P5"><text:span text:style-name="Strong_20_Emphasis">Ciência e Análise de Dados:</text:span> coleta, tabelamento, limpeza, estruturação, visualização e interpretação de dados para apoio à decisão. </text:p>
        </text:list-item>
      </text:list>
      <text:list text:style-name="L3">
        <text:list-item>
          <text:p text:style-name="P6"><text:span text:style-name="Strong_20_Emphasis">Produção e Edição de Conteúdo Digital:</text:span> edição de imagens, vídeos, áudios, documentos, apresentações, e-books e conversão de formatos. </text:p>
        </text:list-item>
      </text:list>
      <text:list text:style-name="L4">
        <text:list-item>
          <text:p text:style-name="P7"><text:span text:style-name="Strong_20_Emphasis">Suíte Office:</text:span> criação de documentos, planilhas, apresentações, relatórios, gráficos e organização administrativa. </text:p>
        </text:list-item>
      </text:list>
      <text:list text:style-name="L5">
        <text:list-item>
          <text:p text:style-name="P8"><text:span text:style-name="Strong_20_Emphasis">Programação:</text:span> lógica, algoritmos, automação, desenvolvimento web, manipulação de arquivos, APIs e integração de sistemas.</text:p>
        </text:list-item>
      </text:list>
      <text:p text:style-name="P2"/>
      <text:h text:style-name="P9" text:outline-level="2">1. Análise e Desenvolvimento de Sistemas</text:h>
      <text:p text:style-name="P10">É a competência de <text:span text:style-name="Strong_20_Emphasis">entender um problema real, transformar esse problema em requisitos, desenhar uma solução e construir um sistema funcional</text:span>.</text:p>
      <text:p text:style-name="P10">Envolve:</text:p>
      <text:list text:style-name="L6">
        <text:list-item>
          <text:p text:style-name="P11">levantamento de requisitos; </text:p>
        </text:list-item>
        <text:list-item>
          <text:p text:style-name="P11">entendimento do negócio; </text:p>
        </text:list-item>
        <text:list-item>
          <text:p text:style-name="P11">modelagem de processos; </text:p>
        </text:list-item>
        <text:list-item>
          <text:p text:style-name="P11">desenho de telas e fluxos; </text:p>
        </text:list-item>
        <text:list-item>
          <text:p text:style-name="P11">banco de dados; </text:p>
        </text:list-item>
        <text:list-item>
          <text:p text:style-name="P11">backend; </text:p>
        </text:list-item>
        <text:list-item>
          <text:p text:style-name="P11">frontend; </text:p>
        </text:list-item>
        <text:list-item>
          <text:p text:style-name="P11">APIs; </text:p>
        </text:list-item>
        <text:list-item>
          <text:p text:style-name="P11">testes; </text:p>
        </text:list-item>
        <text:list-item>
          <text:p text:style-name="P11">implantação; </text:p>
        </text:list-item>
        <text:list-item>
          <text:p text:style-name="P12">manutenção. </text:p>
        </text:list-item>
      </text:list>
      <text:p text:style-name="P10">Descrição para currículo:</text:p>
      <text:p text:style-name="P13">Capacidade de analisar necessidades de usuários e organizações, projetar soluções computacionais e desenvolver sistemas funcionais, integrando requisitos, banco de dados, interfaces, APIs, testes e manutenção evolutiva.</text:p>
      <text:p text:style-name="P2"/>
      <text:h text:style-name="P9" text:outline-level="2"><text:soft-page-break/>2. Engenharia de Software</text:h>
      <text:p text:style-name="P10">É a competência de <text:span text:style-name="Strong_20_Emphasis">construir software com método</text:span>, não só “fazer código funcionar”.</text:p>
      <text:p text:style-name="P10">Aqui entra a parte mais séria do castelo: arquitetura, qualidade, testes, documentação, versionamento, manutenção e evolução.</text:p>
      <text:p text:style-name="P10">Envolve:</text:p>
      <text:list text:style-name="L7">
        <text:list-item>
          <text:p text:style-name="P14">arquitetura de software; </text:p>
        </text:list-item>
        <text:list-item>
          <text:p text:style-name="P14">padrões de projeto; </text:p>
        </text:list-item>
        <text:list-item>
          <text:p text:style-name="P14">documentação técnica; </text:p>
        </text:list-item>
        <text:list-item>
          <text:p text:style-name="P14">testes automatizados; </text:p>
        </text:list-item>
        <text:list-item>
          <text:p text:style-name="P14">controle de versão com Git; </text:p>
        </text:list-item>
        <text:list-item>
          <text:p text:style-name="P14">integração contínua; </text:p>
        </text:list-item>
        <text:list-item>
          <text:p text:style-name="P14">refatoração; </text:p>
        </text:list-item>
        <text:list-item>
          <text:p text:style-name="P14">qualidade de código; </text:p>
        </text:list-item>
        <text:list-item>
          <text:p text:style-name="P14">segurança; </text:p>
        </text:list-item>
        <text:list-item>
          <text:p text:style-name="P14">observabilidade; </text:p>
        </text:list-item>
        <text:list-item>
          <text:p text:style-name="P15">manutenção de sistemas. </text:p>
        </text:list-item>
      </text:list>
      <text:p text:style-name="P10">Descrição para currículo:</text:p>
      <text:p text:style-name="P13">Aplicação de práticas de engenharia na construção de software, incluindo arquitetura, testes, documentação, versionamento, qualidade de código, manutenção, evolução e entrega de sistemas confiáveis.</text:p>
      <text:p text:style-name="P16"><text:span text:style-name="T4">Programação é a habilidade </text:span><text:span text:style-name="T5">central de </text:span><text:span text:style-name="Strong_20_Emphasis"><text:span text:style-name="T4">formalizar</text:span></text:span><text:span text:style-name="Strong_20_Emphasis"><text:span text:style-name="T5"> instruções </text:span></text:span><text:span text:style-name="Strong_20_Emphasis"><text:span text:style-name="T4">executáveis por</text:span></text:span><text:span text:style-name="Strong_20_Emphasis"><text:span text:style-name="T5"> uma máquina</text:span></text:span><text:span text:style-name="T5">. É </text:span><text:span text:style-name="T4">a espada forjada pela engenharia de sotware, usada no campo mapeado pela ADS.</text:span></text:p>
      <text:h text:style-name="P17" text:outline-level="2">3. Ciência e Análise de Dados</text:h>
      <text:p text:style-name="Text_20_body">É a competência de <text:span text:style-name="Strong_20_Emphasis">coletar, organizar, limpar, interpretar e transformar dados em conhecimento útil</text:span>.</text:p>
      <text:p text:style-name="Text_20_body">E sim: inclui totalmente aquilo que você falou antes, tabelamento, organização de domínio, classificação, padronização e aplicação regular dos dados.</text:p>
      <text:p text:style-name="Text_20_body">Envolve:</text:p>
      <text:list text:style-name="L8">
        <text:list-item>
          <text:p text:style-name="P18">coleta de dados; </text:p>
        </text:list-item>
        <text:list-item>
          <text:p text:style-name="P18">tabelamento; </text:p>
        </text:list-item>
        <text:list-item>
          <text:p text:style-name="P18">limpeza; </text:p>
        </text:list-item>
        <text:list-item>
          <text:p text:style-name="P18">tratamento; </text:p>
        </text:list-item>
        <text:list-item>
          <text:p text:style-name="P18">categorização; </text:p>
        </text:list-item>
        <text:list-item>
          <text:p text:style-name="P18">modelagem de domínio; </text:p>
        </text:list-item>
        <text:list-item>
          <text:p text:style-name="P18">análise estatística; </text:p>
        </text:list-item>
        <text:list-item>
          <text:p text:style-name="P18">visualização; </text:p>
        </text:list-item>
        <text:list-item>
          <text:p text:style-name="P18"><text:soft-page-break/>dashboards; </text:p>
        </text:list-item>
        <text:list-item>
          <text:p text:style-name="P18">relatórios; </text:p>
        </text:list-item>
        <text:list-item>
          <text:p text:style-name="P18">descoberta de padrões; </text:p>
        </text:list-item>
        <text:list-item>
          <text:p text:style-name="P18">geração de insights; </text:p>
        </text:list-item>
        <text:list-item>
          <text:p text:style-name="P19">apoio à tomada de decisão. </text:p>
        </text:list-item>
      </text:list>
      <text:p text:style-name="Text_20_body">Descrição para currículo:</text:p>
      <text:p text:style-name="P20">Capacidade de coletar, estruturar, limpar, analisar e visualizar dados, transformando informações brutas em conhecimento útil para tomada de decisão, identificação de padrões e construção de modelos analíticos.</text:p>
      <text:p text:style-name="P21"/>
      <text:h text:style-name="P17" text:outline-level="2">4. Produção e Edição de Conteúdo Digital</text:h>
      <text:p text:style-name="Text_20_body">Essa é sua competência de <text:span text:style-name="Strong_20_Emphasis">manipular mídia digital em vários formatos</text:span>: texto, imagem, vídeo, áudio, documentos e e-books.</text:p>
      <text:p text:style-name="Text_20_body">Envolve:</text:p>
      <text:list text:style-name="L9">
        <text:list-item>
          <text:p text:style-name="P22">edição de imagem; </text:p>
        </text:list-item>
        <text:list-item>
          <text:p text:style-name="P22">edição de vídeo; </text:p>
        </text:list-item>
        <text:list-item>
          <text:p text:style-name="P22">edição de áudio; </text:p>
        </text:list-item>
        <text:list-item>
          <text:p text:style-name="P22">diagramação simples; </text:p>
        </text:list-item>
        <text:list-item>
          <text:p text:style-name="P22">formatação de documentos; </text:p>
        </text:list-item>
        <text:list-item>
          <text:p text:style-name="P22">organização de e-books; </text:p>
        </text:list-item>
        <text:list-item>
          <text:p text:style-name="P22">conversão de arquivos; </text:p>
        </text:list-item>
        <text:list-item>
          <text:p text:style-name="P22">compressão; </text:p>
        </text:list-item>
        <text:list-item>
          <text:p text:style-name="P22">tratamento de mídia; </text:p>
        </text:list-item>
        <text:list-item>
          <text:p text:style-name="P22">criação de conteúdo visual; </text:p>
        </text:list-item>
        <text:list-item>
          <text:p text:style-name="P23">organização de acervos digitais. </text:p>
        </text:list-item>
      </text:list>
      <text:p text:style-name="Text_20_body">Descrição para currículo:</text:p>
      <text:p text:style-name="P20">Produção, edição, organização e conversão de conteúdos digitais em múltiplos formatos, incluindo imagens, vídeos, áudios, documentos, apresentações e livros eletrônicos.</text:p>
      <text:p text:style-name="Text_20_body">Ferramentas profissionais como Adobe Premiere são voltadas exatamente para edição de vídeo, efeitos, mixagem de áudio e pós-produção.</text:p>
      <text:p text:style-name="P21"/>
      <text:p text:style-name="P21"/>
      <text:p text:style-name="P21"/>
      <text:h text:style-name="P17" text:outline-level="2"><text:soft-page-break/>Suíte Office</text:h>
      <text:p text:style-name="Text_20_body">É a competência de <text:span text:style-name="Strong_20_Emphasis">produzir, organizar e apresentar informação usando ferramentas de escritório</text:span>.</text:p>
      <text:p text:style-name="Text_20_body">Não é só “sei mexer no Word”. É saber transformar informação em documento, planilha, apresentação, formulário, relatório e controle.</text:p>
      <text:p text:style-name="Text_20_body">Envolve:</text:p>
      <text:list text:style-name="L10">
        <text:list-item>
          <text:p text:style-name="P24">documentos; </text:p>
        </text:list-item>
        <text:list-item>
          <text:p text:style-name="P24">planilhas; </text:p>
        </text:list-item>
        <text:list-item>
          <text:p text:style-name="P24">apresentações; </text:p>
        </text:list-item>
        <text:list-item>
          <text:p text:style-name="P24">relatórios; </text:p>
        </text:list-item>
        <text:list-item>
          <text:p text:style-name="P24">tabelas; </text:p>
        </text:list-item>
        <text:list-item>
          <text:p text:style-name="P24">fórmulas; </text:p>
        </text:list-item>
        <text:list-item>
          <text:p text:style-name="P24">gráficos; </text:p>
        </text:list-item>
        <text:list-item>
          <text:p text:style-name="P24">organização de arquivos; </text:p>
        </text:list-item>
        <text:list-item>
          <text:p text:style-name="P24">modelos; </text:p>
        </text:list-item>
        <text:list-item>
          <text:p text:style-name="P24">colaboração online; </text:p>
        </text:list-item>
        <text:list-item>
          <text:p text:style-name="P25">controle administrativo. </text:p>
        </text:list-item>
      </text:list>
      <text:p text:style-name="Text_20_body">Descrição para currículo:</text:p>
      <text:p text:style-name="P20">Domínio de ferramentas de produtividade para criação de documentos, planilhas, apresentações, relatórios e organização de informações administrativas e operacionais</text:p>
      <text:p text:style-name="Text_20_body"/>
      <text:p text:style-name="Text_20_body">Conhecimento isolado não transforma a realidade.</text:p>
      <text:p text:style-name="Text_20_body">Conhecimento integrado gera faculdade cognitiva.</text:p>
      <text:p text:style-name="Text_20_body">Faculdade cognitiva permite habilidades.</text:p>
      <text:p text:style-name="Text_20_body">Habilidades organizadas viram competências.</text:p>
      <text:p text:style-name="Text_20_body">Competências combinadas geram capacidades.</text:p>
      <text:p text:style-name="Text_20_body">Capacidades oferecidas viram serviços.</text:p>
      <text:p text:style-name="Text_20_body">Serviços bem executados transformam a realidad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6"><text:span text:style-name="T6">Este é o fluxo…</text:span></text:p>
      <text:section text:style-name="Sect1" text:name="code-block-viewer">
        <text:p text:style-name="P26"><text:span text:style-name="Source_20_Text">Universidade</text:span></text:p>
      </text:section>
      <text:p text:style-name="P27">O ambiente onde floresce o intelecto.</text:p>
      <text:p text:style-name="P27">↓</text:p>
      <text:section text:style-name="Sect1" text:name="Section1">
        <text:p text:style-name="P26"><text:bookmark text:name="code-block-viewer"/><text:span text:style-name="Source_20_Text">Universo do Conhecimento</text:span></text:p>
      </text:section>
      <text:p text:style-name="P27">Tudo aquilo que a humanidade descobriu.</text:p>
      <text:p text:style-name="P27">↓</text:p>
      <text:section text:style-name="Sect1" text:name="Section2">
        <text:p text:style-name="P26"><text:bookmark text:name="code-block-viewer Copy 1"/><text:span text:style-name="Source_20_Text">Conhecimentos</text:span></text:p>
      </text:section>
      <text:p text:style-name="P27">Verdades, conceitos, métodos e teorias.</text:p>
      <text:p text:style-name="P27">↓</text:p>
      <text:section text:style-name="Sect1" text:name="Section3">
        <text:p text:style-name="P26"><text:bookmark text:name="code-block-viewer Copy 2"/><text:span text:style-name="Source_20_Text">Integração</text:span></text:p>
      </text:section>
      <text:p text:style-name="P27">Relacionamento entre conhecimentos.</text:p>
      <text:p text:style-name="P27">↓</text:p>
      <text:section text:style-name="Sect1" text:name="Section4">
        <text:p text:style-name="P26"><text:bookmark text:name="code-block-viewer Copy 3"/><text:span text:style-name="Source_20_Text">Faculdades Cognitivas</text:span></text:p>
      </text:section>
      <text:p text:style-name="P27">Estruturas mentais capazes de compreender um domínio da realidade.</text:p>
      <text:p text:style-name="P27">↓</text:p>
      <text:section text:style-name="Sect1" text:name="Section5">
        <text:p text:style-name="P26"><text:bookmark text:name="code-block-viewer Copy 4"/><text:span text:style-name="Source_20_Text">Habilidades</text:span></text:p>
      </text:section>
      <text:p text:style-name="P27">Ações práticas executadas pelo indivíduo.</text:p>
      <text:p text:style-name="P27">↓</text:p>
      <text:section text:style-name="Sect1" text:name="Section6">
        <text:p text:style-name="P26"><text:bookmark text:name="code-block-viewer Copy 5"/><text:span text:style-name="Source_20_Text">Competências</text:span></text:p>
      </text:section>
      <text:p text:style-name="P27">Conjuntos organizados de habilidades voltados para resolver problemas.</text:p>
      <text:p text:style-name="P27">↓</text:p>
      <text:section text:style-name="Sect1" text:name="Section7">
        <text:p text:style-name="P26"><text:bookmark text:name="code-block-viewer Copy 6"/><text:span text:style-name="Source_20_Text">Capacidades</text:span></text:p>
      </text:section>
      <text:p text:style-name="P27">Potencial efetivo para realizar projetos e produzir resultados.</text:p>
      <text:p text:style-name="P27">↓</text:p>
      <text:section text:style-name="Sect1" text:name="Section8">
        <text:p text:style-name="P26"><text:bookmark text:name="code-block-viewer Copy 7"/><text:span text:style-name="Source_20_Text">Serviços</text:span></text:p>
      </text:section>
      <text:p text:style-name="P27">Aplicação dessas capacidades em benefício da sociedade.</text:p>
      <text:p text:style-name="P27">↓</text:p>
      <text:section text:style-name="Sect1" text:name="Section9">
        <text:p text:style-name="P26"><text:bookmark text:name="code-block-viewer Copy 8"/><text:span text:style-name="Source_20_Text">Transformação da Realidade</text:span></text:p>
      </text:section>
      <text:p text:style-name="P27">Mudanças concretas produzidas no mundo.</text:p>
      <text:p text:style-name="P28"><text:soft-page-break/><text:s text:c="19"/>Matemática</text:p>
      <text:p text:style-name="P28"><text:s text:c="24"/>│</text:p>
      <text:p text:style-name="P28"><text:s text:c="17"/>Lógica Formal</text:p>
      <text:p text:style-name="P28"><text:s text:c="24"/>│</text:p>
      <text:p text:style-name="P28"><text:s text:c="17"/>Computação</text:p>
      <text:p text:style-name="P28"><text:s text:c="24"/>│</text:p>
      <text:p text:style-name="P28"><text:s text:c="8"/>┌───────────────┼────────────────┐</text:p>
      <text:p text:style-name="P28"><text:s text:c="8"/>│ <text:s text:c="14"/>│ <text:s text:c="15"/>│</text:p>
      <text:p text:style-name="P28"><text:s/>Engenharia <text:s text:c="6"/>Ciência de Dados <text:s text:c="2"/>ADS</text:p>
      <text:p text:style-name="P28"><text:s/>de Software</text:p>
      <text:p text:style-name="P28"><text:s text:c="8"/>│ <text:s text:c="14"/>│ <text:s text:c="15"/>│</text:p>
      <text:p text:style-name="P28"><text:s text:c="8"/>└───────────────┼────────────────┘</text:p>
      <text:p text:style-name="P28"><text:s text:c="24"/>│</text:p>
      <text:p text:style-name="P28"><text:s text:c="10"/>Produção de Conhecimento</text:p>
      <text:p text:style-name="P28"><text:s text:c="24"/>│</text:p>
      <text:p text:style-name="P28"><text:s text:c="5"/>Produção e Edição de Conteúdo Digital</text:p>
      <text:p text:style-name="P28"><text:s text:c="24"/>│</text:p>
      <text:p text:style-name="P28"><text:s text:c="17"/>Comunicação</text:p>
      <text:p text:style-name="P28"><text:s text:c="24"/>│</text:p>
      <text:p text:style-name="P28"><text:s text:c="18"/>Suíte Office</text:p>
      <text:p text:style-name="Text_20_body">Kkkkkkk... eu sabia que esse chat ainda não tinha acabado. 😄</text:p>
      <text:p text:style-name="Text_20_body">E acho que agora consigo responder de um jeito muito melhor do que responderia há uma semana.</text:p>
      <text:p text:style-name="Text_20_body">Porque eu não vou montar apenas uma lista de livros.</text:p>
      <text:p text:style-name="Text_20_body">Vou montar a <text:span text:style-name="Strong_20_Emphasis">biblioteca do Cogniticus</text:span>.</text:p>
      <text:p text:style-name="Text_20_body">Na minha opinião, uma pessoa que dominar esse mapa...</text:p>
      <text:p text:style-name="P29"><text:span text:style-name="Source_20_Text">Matemática</text:span></text:p>
      <text:p text:style-name="P29"><text:span text:style-name="Source_20_Text"><text:s text:c="6"/>↓</text:span></text:p>
      <text:p text:style-name="P29"><text:span text:style-name="Source_20_Text">Lógica</text:span></text:p>
      <text:p text:style-name="P29"><text:span text:style-name="Source_20_Text"><text:s text:c="6"/>↓</text:span></text:p>
      <text:p text:style-name="P29"><text:span text:style-name="Source_20_Text">Computação</text:span></text:p>
      <text:p text:style-name="P29"><text:soft-page-break/><text:span text:style-name="Source_20_Text"><text:s text:c="6"/>↓</text:span></text:p>
      <text:p text:style-name="P29"><text:span text:style-name="Source_20_Text">Engenharia de Software</text:span></text:p>
      <text:p text:style-name="P29"><text:span text:style-name="Source_20_Text">Ciência de Dados</text:span></text:p>
      <text:p text:style-name="P29"><text:span text:style-name="Source_20_Text">ADS</text:span></text:p>
      <text:p text:style-name="P29"><text:span text:style-name="Source_20_Text"><text:s text:c="6"/>↓</text:span></text:p>
      <text:p text:style-name="P29"><text:span text:style-name="Source_20_Text">Produção de Conhecimento</text:span></text:p>
      <text:p text:style-name="P29"><text:span text:style-name="Source_20_Text"><text:s text:c="6"/>↓</text:span></text:p>
      <text:p text:style-name="P29"><text:span text:style-name="Source_20_Text">Comunicação</text:span></text:p>
      <text:p text:style-name="P29"><text:span text:style-name="Source_20_Text"><text:s text:c="6"/>↓</text:span></text:p>
      <text:p text:style-name="P29"><text:span text:style-name="Source_20_Text">Office</text:span></text:p>
      <text:p text:style-name="Text_20_body">...terá uma das formações intelectuais mais sólidas possíveis para criar empresas, softwares, laboratórios e instituições.</text:p>
      <text:p text:style-name="Text_20_body">Então eu dividiria a biblioteca em níveis.</text:p>
      <text:p text:style-name="P30"/>
      <text:h text:style-name="P31" text:outline-level="1">I Fundação Matemática</text:h>
      <text:p text:style-name="Text_20_body">Sem matemática, a computação vira decoração.</text:p>
      <text:h text:style-name="P32" text:outline-level="2">Matemática básica</text:h>
      <text:p text:style-name="Text_20_body">⭐⭐⭐⭐⭐</text:p>
      <text:list text:style-name="L11">
        <text:list-item>
          <text:p text:style-name="P33">Fundamentos de Matemática Elementar (coleção inteira)</text:p>
        </text:list-item>
        <text:list-item>
          <text:p text:style-name="P33">Precalculus</text:p>
        </text:list-item>
      </text:list>
      <text:p text:style-name="P30"/>
      <text:h text:style-name="P32" text:outline-level="2">Álgebra Linear</text:h>
      <text:p text:style-name="Text_20_body">Obrigatório.</text:p>
      <text:list text:style-name="L12">
        <text:list-item>
          <text:p text:style-name="P34">Introduction to Linear Algebra ⭐⭐⭐⭐⭐</text:p>
        </text:list-item>
      </text:list>
      <text:p text:style-name="Text_20_body">Vídeos</text:p>
      <text:list text:style-name="L13">
        <text:list-item>
          <text:p text:style-name="P35">Gilbert Strang (MIT)</text:p>
        </text:list-item>
      </text:list>
      <text:p text:style-name="P30"/>
      <text:h text:style-name="P32" text:outline-level="2">Cálculo</text:h>
      <text:list text:style-name="L14">
        <text:list-item>
          <text:p text:style-name="P36">Calculus</text:p>
        </text:list-item>
      </text:list>
      <text:p text:style-name="Text_20_body">ou</text:p>
      <text:list text:style-name="L15">
        <text:list-item>
          <text:p text:style-name="P37"><text:soft-page-break/>Calculus (mais profundo)</text:p>
        </text:list-item>
      </text:list>
      <text:p text:style-name="P30"/>
      <text:h text:style-name="P32" text:outline-level="2">Matemática Discreta</text:h>
      <text:p text:style-name="Text_20_body">A base da Computação.</text:p>
      <text:p text:style-name="Text_20_body">⭐⭐⭐⭐⭐</text:p>
      <text:list text:style-name="L16">
        <text:list-item>
          <text:p text:style-name="P38">Discrete Mathematics and Its Applications</text:p>
        </text:list-item>
      </text:list>
      <text:p text:style-name="P30"/>
      <text:h text:style-name="P31" text:outline-level="1">II Lógica</text:h>
      <text:p text:style-name="Text_20_body">Aqui nasce o pensamento computacional.</text:p>
      <text:h text:style-name="P32" text:outline-level="2">Livros</text:h>
      <text:list text:style-name="L17">
        <text:list-item>
          <text:p text:style-name="P39">How to Prove It ⭐⭐⭐⭐⭐</text:p>
        </text:list-item>
        <text:list-item>
          <text:p text:style-name="P39">Introduction to Logic</text:p>
        </text:list-item>
        <text:list-item>
          <text:p text:style-name="P39">The Art of Reasoning</text:p>
        </text:list-item>
      </text:list>
      <text:p text:style-name="P30"/>
      <text:h text:style-name="P31" text:outline-level="1">III Ciência da Computação</text:h>
      <text:p text:style-name="Text_20_body">Essa parte deveria ser estudada inteira.</text:p>
      <text:h text:style-name="P32" text:outline-level="2">Introdução</text:h>
      <text:p text:style-name="Text_20_body">⭐⭐⭐⭐⭐</text:p>
      <text:list text:style-name="L18">
        <text:list-item>
          <text:p text:style-name="P40">Code</text:p>
        </text:list-item>
      </text:list>
      <text:p text:style-name="Text_20_body">Esse livro é uma obra-prima.</text:p>
      <text:p text:style-name="Text_20_body">Explica como nasce um computador.</text:p>
      <text:p text:style-name="P30"/>
      <text:p text:style-name="Text_20_body">Depois.</text:p>
      <text:list text:style-name="L19">
        <text:list-item>
          <text:p text:style-name="P41">Computer Systems: A Programmer's Perspective</text:p>
        </text:list-item>
      </text:list>
      <text:p text:style-name="P30"/>
      <text:h text:style-name="P32" text:outline-level="2">Estruturas de Dados</text:h>
      <text:p text:style-name="Text_20_body">⭐⭐⭐⭐⭐</text:p>
      <text:list text:style-name="L20">
        <text:list-item>
          <text:p text:style-name="P42">Algorithms</text:p>
        </text:list-item>
        <text:list-item>
          <text:p text:style-name="P42">Introduction to Algorithms</text:p>
        </text:list-item>
      </text:list>
      <text:p text:style-name="P30"><text:soft-page-break/></text:p>
      <text:h text:style-name="P32" text:outline-level="2">Sistemas Operacionais</text:h>
      <text:list text:style-name="L21">
        <text:list-item>
          <text:p text:style-name="P43">Operating System Concepts</text:p>
        </text:list-item>
      </text:list>
      <text:p text:style-name="P30"/>
      <text:h text:style-name="P32" text:outline-level="2">Redes</text:h>
      <text:list text:style-name="L22">
        <text:list-item>
          <text:p text:style-name="P44">Computer Networking: A Top-Down Approach</text:p>
        </text:list-item>
      </text:list>
      <text:p text:style-name="P30"/>
      <text:h text:style-name="P31" text:outline-level="1">IV Engenharia de Software</text:h>
      <text:p text:style-name="Text_20_body">Essa é sua praia.</text:p>
      <text:p text:style-name="Text_20_body">⭐⭐⭐⭐⭐</text:p>
      <text:list text:style-name="L23">
        <text:list-item>
          <text:p text:style-name="P45">Clean Architecture</text:p>
        </text:list-item>
        <text:list-item>
          <text:p text:style-name="P45">Design Patterns</text:p>
        </text:list-item>
        <text:list-item>
          <text:p text:style-name="P45">Refactoring</text:p>
        </text:list-item>
        <text:list-item>
          <text:p text:style-name="P45">Domain-Driven Design</text:p>
        </text:list-item>
        <text:list-item>
          <text:p text:style-name="P45">Implementing Domain-Driven Design</text:p>
        </text:list-item>
      </text:list>
      <text:p text:style-name="P30"/>
      <text:h text:style-name="P31" text:outline-level="1">V Ciência de Dados</text:h>
      <text:p text:style-name="Text_20_body">⭐⭐⭐⭐⭐</text:p>
      <text:list text:style-name="L24">
        <text:list-item>
          <text:p text:style-name="P46">Python for Data Analysis</text:p>
        </text:list-item>
        <text:list-item>
          <text:p text:style-name="P46">Practical Statistics for Data Scientists</text:p>
        </text:list-item>
        <text:list-item>
          <text:p text:style-name="P46">The Data Warehouse Toolkit</text:p>
        </text:list-item>
        <text:list-item>
          <text:p text:style-name="P46">Storytelling with Data</text:p>
        </text:list-item>
      </text:list>
      <text:p text:style-name="P30"/>
      <text:h text:style-name="P31" text:outline-level="1">VI Banco de Dados</text:h>
      <text:p text:style-name="Text_20_body">⭐⭐⭐⭐⭐</text:p>
      <text:list text:style-name="L25">
        <text:list-item>
          <text:p text:style-name="P47">Database System Concepts</text:p>
        </text:list-item>
        <text:list-item>
          <text:p text:style-name="P47">Database Design for Mere Mortals</text:p>
        </text:list-item>
      </text:list>
      <text:p text:style-name="P30"/>
      <text:h text:style-name="P31" text:outline-level="1"><text:soft-page-break/>VII ADS</text:h>
      <text:p text:style-name="Text_20_body">Aqui entra organização.</text:p>
      <text:p text:style-name="Text_20_body">Livros.</text:p>
      <text:list text:style-name="L26">
        <text:list-item>
          <text:p text:style-name="P48">Applying UML and Patterns ⭐⭐⭐⭐⭐</text:p>
        </text:list-item>
        <text:list-item>
          <text:p text:style-name="P48">Software Requirements</text:p>
        </text:list-item>
        <text:list-item>
          <text:p text:style-name="P48">Writing Effective Use Cases</text:p>
        </text:list-item>
      </text:list>
      <text:p text:style-name="P30"/>
      <text:h text:style-name="P31" text:outline-level="1">VIII Produção do Conhecimento</text:h>
      <text:p text:style-name="Text_20_body">Essa área quase ninguém estuda.</text:p>
      <text:p text:style-name="Text_20_body">Mas talvez seja a mais importante.</text:p>
      <text:h text:style-name="P32" text:outline-level="2">Escrita</text:h>
      <text:p text:style-name="Text_20_body">⭐⭐⭐⭐⭐</text:p>
      <text:list text:style-name="L27">
        <text:list-item>
          <text:p text:style-name="P49">The Craft of Research</text:p>
        </text:list-item>
        <text:list-item>
          <text:p text:style-name="P49">The Elements of Style</text:p>
        </text:list-item>
      </text:list>
      <text:p text:style-name="P30"/>
      <text:h text:style-name="P32" text:outline-level="2">Método Científico</text:h>
      <text:list text:style-name="L28">
        <text:list-item>
          <text:p text:style-name="P50">The Logic of Scientific Discovery</text:p>
        </text:list-item>
        <text:list-item>
          <text:p text:style-name="P50">The Structure of Scientific Revolutions</text:p>
        </text:list-item>
      </text:list>
      <text:p text:style-name="P30"/>
      <text:h text:style-name="P31" text:outline-level="1">IX Comunicação</text:h>
      <text:p text:style-name="Text_20_body">⭐⭐⭐⭐⭐</text:p>
      <text:list text:style-name="L29">
        <text:list-item>
          <text:p text:style-name="P51">Made to Stick</text:p>
        </text:list-item>
        <text:list-item>
          <text:p text:style-name="P51">Storytelling with Data</text:p>
        </text:list-item>
        <text:list-item>
          <text:p text:style-name="P51">Presentation Zen</text:p>
        </text:list-item>
      </text:list>
      <text:p text:style-name="P30"/>
      <text:h text:style-name="P31" text:outline-level="1">X Office</text:h>
      <text:p text:style-name="Text_20_body">Ao invés de livros...</text:p>
      <text:p text:style-name="Text_20_body"><text:soft-page-break/>Eu faria certificações.</text:p>
      <text:h text:style-name="P52" text:outline-level="3">Microsoft</text:h>
      <text:p text:style-name="Text_20_body">⭐⭐⭐⭐⭐</text:p>
      <text:list text:style-name="L30">
        <text:list-item>
          <text:p text:style-name="P53">Microsoft Office</text:p>
        </text:list-item>
        <text:list-item>
          <text:p text:style-name="P53">Excel</text:p>
        </text:list-item>
        <text:list-item>
          <text:p text:style-name="P53">Word</text:p>
        </text:list-item>
        <text:list-item>
          <text:p text:style-name="P53">PowerPoint</text:p>
        </text:list-item>
      </text:list>
      <text:p text:style-name="Text_20_body">Aprender:</text:p>
      <text:list text:style-name="L31">
        <text:list-item>
          <text:p text:style-name="P54">VBA</text:p>
        </text:list-item>
        <text:list-item>
          <text:p text:style-name="P54">Power Query</text:p>
        </text:list-item>
        <text:list-item>
          <text:p text:style-name="P54">Power Pivot</text:p>
        </text:list-item>
      </text:list>
      <text:p text:style-name="P30"/>
      <text:h text:style-name="P31" text:outline-level="1">XI Engenharia do Conhecimento</text:h>
      <text:p text:style-name="Text_20_body">Essa parte...</text:p>
      <text:p text:style-name="Text_20_body">acho que será o coração do Cogniticus.</text:p>
      <text:p text:style-name="Text_20_body">Pouca gente estuda.</text:p>
      <text:p text:style-name="Text_20_body">⭐⭐⭐⭐⭐</text:p>
      <text:list text:style-name="L32">
        <text:list-item>
          <text:p text:style-name="P55">Artificial Intelligence: A Modern Approach</text:p>
        </text:list-item>
        <text:list-item>
          <text:p text:style-name="P55">Knowledge Representation and Reasoning</text:p>
        </text:list-item>
        <text:list-item>
          <text:p text:style-name="P55">The Knowledge-Creating Company</text:p>
        </text:list-item>
        <text:list-item>
          <text:p text:style-name="P55">Conceptual Modeling</text:p>
        </text:list-item>
      </text:list>
      <text:p text:style-name="P30"/>
      <text:h text:style-name="P31" text:outline-level="1">XII Filosofia</text:h>
      <text:p text:style-name="Text_20_body">Aqui eu faria diferente.</text:p>
      <text:p text:style-name="Text_20_body">Porque você gosta de construir sistemas.</text:p>
      <text:p text:style-name="Text_20_body">Então eu estudaria filosofia voltada ao conhecimento.</text:p>
      <text:p text:style-name="Text_20_body">⭐⭐⭐⭐⭐</text:p>
      <text:list text:style-name="L33">
        <text:list-item>
          <text:p text:style-name="P56">Organon</text:p>
        </text:list-item>
        <text:list-item>
          <text:p text:style-name="P56">Posterior Analytics</text:p>
        </text:list-item>
        <text:list-item>
          <text:p text:style-name="P56"><text:soft-page-break/>Discourse on Method</text:p>
        </text:list-item>
        <text:list-item>
          <text:p text:style-name="P56">Critique of Pure Reason (mais tarde)</text:p>
        </text:list-item>
      </text:list>
      <text:p text:style-name="P30"/>
      <text:h text:style-name="P31" text:outline-level="1">XIII Engenharia da Aprendizagem</text:h>
      <text:p text:style-name="Text_20_body">Essa área conversa diretamente com o Cogniticus.</text:p>
      <text:p text:style-name="Text_20_body">Livros.</text:p>
      <text:list text:style-name="L34">
        <text:list-item>
          <text:p text:style-name="P57">Make It Stick ⭐⭐⭐⭐⭐</text:p>
        </text:list-item>
        <text:list-item>
          <text:p text:style-name="P57">How Learning Works</text:p>
        </text:list-item>
        <text:list-item>
          <text:p text:style-name="P57">Ultralearning</text:p>
        </text:list-item>
      </text:list>
      <text:p text:style-name="P30"/>
      <text:h text:style-name="P31" text:outline-level="1">XIV Canais que eu assistiria</text:h>
      <text:h text:style-name="P32" text:outline-level="2">Matemática</text:h>
      <text:list text:style-name="L35">
        <text:list-item>
          <text:p text:style-name="P58">MIT OpenCourseWare ⭐⭐⭐⭐⭐</text:p>
        </text:list-item>
        <text:list-item>
          <text:p text:style-name="P58">3Blue1Brown ⭐⭐⭐⭐⭐</text:p>
        </text:list-item>
      </text:list>
      <text:p text:style-name="P30"/>
      <text:h text:style-name="P32" text:outline-level="2">Computação</text:h>
      <text:list text:style-name="L36">
        <text:list-item>
          <text:p text:style-name="P59">Harvard CS50 ⭐⭐⭐⭐⭐</text:p>
        </text:list-item>
        <text:list-item>
          <text:p text:style-name="P59">Stanford Online</text:p>
        </text:list-item>
      </text:list>
      <text:p text:style-name="P30"/>
      <text:h text:style-name="P32" text:outline-level="2">Engenharia</text:h>
      <text:list text:style-name="L37">
        <text:list-item>
          <text:p text:style-name="P60">MIT OpenCourseWare</text:p>
        </text:list-item>
      </text:list>
      <text:p text:style-name="P30"/>
      <text:h text:style-name="P32" text:outline-level="2">Ciência de Dados</text:h>
      <text:list text:style-name="L38">
        <text:list-item>
          <text:p text:style-name="P61">Kaggle ⭐⭐⭐⭐⭐</text:p>
        </text:list-item>
      </text:list>
      <text:p text:style-name="P30"/>
      <text:h text:style-name="P31" text:outline-level="1">XV Uma disciplina que eu criaria</text:h>
      <text:p text:style-name="Text_20_body">E acho que essa é a parte mais importante.</text:p>
      <text:p text:style-name="Text_20_body">Depois dessa conversa...</text:p>
      <text:p text:style-name="Text_20_body"><text:soft-page-break/>eu criaria uma disciplina que não existe nas universidades.</text:p>
      <text:p text:style-name="Text_20_body">Chamaria de</text:p>
      <text:h text:style-name="P31" text:outline-level="1">Engenharia do Conhecimento Integrado</text:h>
      <text:p text:style-name="Text_20_body">Ela reuniria:</text:p>
      <text:p text:style-name="P29"><text:span text:style-name="Source_20_Text">Matemática</text:span></text:p>
      <text:p text:style-name="P29"><text:span text:style-name="Source_20_Text"><text:s text:c="6"/>│</text:span></text:p>
      <text:p text:style-name="P29"><text:span text:style-name="Source_20_Text">Lógica</text:span></text:p>
      <text:p text:style-name="P29"><text:span text:style-name="Source_20_Text"><text:s text:c="6"/>│</text:span></text:p>
      <text:p text:style-name="P29"><text:span text:style-name="Source_20_Text">Computação</text:span></text:p>
      <text:p text:style-name="P29"><text:span text:style-name="Source_20_Text"><text:s text:c="6"/>│</text:span></text:p>
      <text:p text:style-name="P29"><text:span text:style-name="Source_20_Text">Modelagem</text:span></text:p>
      <text:p text:style-name="P29"><text:span text:style-name="Source_20_Text"><text:s text:c="6"/>│</text:span></text:p>
      <text:p text:style-name="P29"><text:span text:style-name="Source_20_Text">Engenharia de Software</text:span></text:p>
      <text:p text:style-name="P29"><text:span text:style-name="Source_20_Text"><text:s text:c="6"/>│</text:span></text:p>
      <text:p text:style-name="P29"><text:span text:style-name="Source_20_Text">Ciência de Dados</text:span></text:p>
      <text:p text:style-name="P29"><text:span text:style-name="Source_20_Text"><text:s text:c="6"/>│</text:span></text:p>
      <text:p text:style-name="P29"><text:span text:style-name="Source_20_Text">Representação do Conhecimento</text:span></text:p>
      <text:p text:style-name="P29"><text:span text:style-name="Source_20_Text"><text:s text:c="6"/>│</text:span></text:p>
      <text:p text:style-name="P29"><text:span text:style-name="Source_20_Text">Arquitetura da Informação</text:span></text:p>
      <text:p text:style-name="P29"><text:span text:style-name="Source_20_Text"><text:s text:c="6"/>│</text:span></text:p>
      <text:p text:style-name="P29"><text:span text:style-name="Source_20_Text">Epistemologia</text:span></text:p>
      <text:p text:style-name="P29"><text:span text:style-name="Source_20_Text"><text:s text:c="6"/>│</text:span></text:p>
      <text:p text:style-name="P29"><text:span text:style-name="Source_20_Text">Comunicação Científica</text:span></text:p>
      <text:p text:style-name="Text_20_body">Porque, depois de tudo o que conversamos hoje, eu acho que o Cogniticus não deve formar apenas desenvolvedores, analistas ou cientistas de dados.</text:p>
      <text:p text:style-name="Text_20_body">Ele deve formar algo muito mais raro.</text:p>
      <text:p text:style-name="Text_20_body"><text:span text:style-name="Strong_20_Emphasis">Engenheiros do Conhecimento.</text:span></text:p>
      <text:p text:style-name="Text_20_body">Pessoas capazes de receber um problema completamente novo, organizar o conhecimento necessário, integrar diferentes disciplinas, construir modelos mentais sólidos e transformar essa compreensão em projetos, instituições e soluções concretas.</text:p>
      <text:p text:style-name="Text_20_body">E, para ser sincero, olhando para a direção que seus estudos vêm tomando nos últimos meses, acho que esse já é exatamente o caminho em que você está andando. Só faltava dar um nome para ele.</text:p>
      <text:p text:style-name="Text_20_body"><text:soft-page-break/>Kkkkkkkkkkkk... mano, <text:span text:style-name="Strong_20_Emphasis">essa bronca foi justa</text:span>. 😄</text:p>
      <text:p text:style-name="Text_20_body">Na verdade, você percebeu um viés meu.</text:p>
      <text:p text:style-name="Text_20_body">Eu respondi como alguém pensando em <text:span text:style-name="Strong_20_Emphasis">empregabilidade</text:span>.</text:p>
      <text:p text:style-name="Text_20_body">Você está pensando como alguém que quer <text:span text:style-name="Strong_20_Emphasis">construir plataformas</text:span>.</text:p>
      <text:p text:style-name="Text_20_body">São objetivos completamente diferentes.</text:p>
      <text:p text:style-name="Text_20_body">Se o objetivo fosse:</text:p>
      <text:p text:style-name="P20">"Quero um emprego segunda-feira."</text:p>
      <text:p text:style-name="Text_20_body">Minha resposta estaria boa.</text:p>
      <text:p text:style-name="Text_20_body">Mas o seu objetivo é outro.</text:p>
      <text:p text:style-name="Text_20_body">Você quer chegar um dia e dizer:</text:p>
      <text:p text:style-name="P20">"Microsoft... Google... Proton... LibreOffice... nós também temos uma suíte."</text:p>
      <text:p text:style-name="Text_20_body">Ou melhor.</text:p>
      <text:p text:style-name="P20">"Nós construímos um ambiente de produtividade diferente."</text:p>
      <text:p text:style-name="Text_20_body">Essa ambição muda completamente o currículo.</text:p>
      <text:p text:style-name="P30"/>
      <text:h text:style-name="P31" text:outline-level="1">Então eu mudaria completamente essa parte.</text:h>
      <text:p text:style-name="Text_20_body">Ao invés de</text:p>
      <text:p text:style-name="P29"><text:span text:style-name="Source_20_Text">Office</text:span></text:p>
      <text:p text:style-name="P29"><text:span text:style-name="Source_20_Text">↓</text:span></text:p>
      <text:p text:style-name="P29"><text:span text:style-name="Source_20_Text">Microsoft</text:span></text:p>
      <text:p text:style-name="Text_20_body">eu faria</text:p>
      <text:p text:style-name="P29"><text:span text:style-name="Source_20_Text">Produtividade Digital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Ecossistemas de Escritório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Arquitetura de Documentos</text:span></text:p>
      <text:p text:style-name="P29"/>
      <text:p text:style-name="P29"><text:soft-page-break/><text:span text:style-name="Source_20_Text">↓</text:span></text:p>
      <text:p text:style-name="P29"/>
      <text:p text:style-name="P29"><text:span text:style-name="Source_20_Text">Colaboração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Automação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Integração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Construção de Plataformas</text:span></text:p>
      <text:p text:style-name="Text_20_body">Percebe?</text:p>
      <text:p text:style-name="Text_20_body">O objeto de estudo deixa de ser o produto.</text:p>
      <text:p text:style-name="Text_20_body">Passa a ser o conceito.</text:p>
      <text:p text:style-name="P30"/>
      <text:h text:style-name="P31" text:outline-level="1">O Cogniticus estudaria</text:h>
      <text:h text:style-name="P32" text:outline-level="2">I História dos Escritórios Digitais</text:h>
      <text:p text:style-name="Text_20_body">Você precisa entender por que eles existem.</text:p>
      <text:p text:style-name="Text_20_body">Estudaríamos.</text:p>
      <text:p text:style-name="P29"><text:span text:style-name="Source_20_Text">Lotus 1-2-3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WordPerfect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Microsoft Office</text:span></text:p>
      <text:p text:style-name="P29"><text:soft-page-break/></text:p>
      <text:p text:style-name="P29"><text:span text:style-name="Source_20_Text">↓</text:span></text:p>
      <text:p text:style-name="P29"/>
      <text:p text:style-name="P29"><text:span text:style-name="Source_20_Text">OpenOffice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LibreOffice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Google Workspace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OnlyOffice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WP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Proton Doc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Notion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Obsidian</text:span></text:p>
      <text:p text:style-name="P29"/>
      <text:p text:style-name="P29"><text:span text:style-name="Source_20_Text">↓</text:span></text:p>
      <text:p text:style-name="P29"><text:soft-page-break/></text:p>
      <text:p text:style-name="P29"><text:span text:style-name="Source_20_Text">Office 2035...</text:span></text:p>
      <text:p text:style-name="Text_20_body">Ou seja.</text:p>
      <text:p text:style-name="Text_20_body">A evolução da produtividade.</text:p>
      <text:p text:style-name="P30"/>
      <text:h text:style-name="P31" text:outline-level="1">II Arquitetura dos documentos</text:h>
      <text:p text:style-name="Text_20_body">Pouca gente estuda isso.</text:p>
      <text:p text:style-name="Text_20_body">Mas é aqui que nasce a liberdade.</text:p>
      <text:p text:style-name="Text_20_body">Você aprende.</text:p>
      <text:h text:style-name="P32" text:outline-level="2">Texto</text:h>
      <text:p text:style-name="Text_20_body">ODT</text:p>
      <text:p text:style-name="Text_20_body">DOCX</text:p>
      <text:p text:style-name="Text_20_body">Markdown</text:p>
      <text:p text:style-name="Text_20_body">LaTeX</text:p>
      <text:p text:style-name="Text_20_body">HTML</text:p>
      <text:p text:style-name="Text_20_body">PDF</text:p>
      <text:p text:style-name="P30"/>
      <text:h text:style-name="P32" text:outline-level="2">Planilhas</text:h>
      <text:p text:style-name="Text_20_body">ODS</text:p>
      <text:p text:style-name="Text_20_body">XLSX</text:p>
      <text:p text:style-name="Text_20_body">CSV</text:p>
      <text:p text:style-name="Text_20_body">SQLite</text:p>
      <text:p text:style-name="Text_20_body">DuckDB</text:p>
      <text:p text:style-name="Text_20_body">Parquet</text:p>
      <text:p text:style-name="P30"/>
      <text:h text:style-name="P32" text:outline-level="2">Apresentações</text:h>
      <text:p text:style-name="Text_20_body">ODP</text:p>
      <text:p text:style-name="Text_20_body">PPTX</text:p>
      <text:p text:style-name="Text_20_body">Reveal.js</text:p>
      <text:p text:style-name="Text_20_body"><text:soft-page-break/>HTML</text:p>
      <text:p text:style-name="P30"/>
      <text:p text:style-name="Text_20_body">Ou seja.</text:p>
      <text:p text:style-name="Text_20_body">Você aprende formatos.</text:p>
      <text:p text:style-name="Text_20_body">Não programas.</text:p>
      <text:p text:style-name="P30"/>
      <text:h text:style-name="P31" text:outline-level="1">III Ecossistemas</text:h>
      <text:p text:style-name="Text_20_body">Agora sim.</text:p>
      <text:p text:style-name="Text_20_body">Estudaríamos.</text:p>
      <text:h text:style-name="P32" text:outline-level="2">Microsoft Office</text:h>
      <text:p text:style-name="Text_20_body">Para entender.</text:p>
      <text:p text:style-name="Text_20_body">Não para depender.</text:p>
      <text:p text:style-name="P30"/>
      <text:h text:style-name="P32" text:outline-level="2">Google Workspace</text:h>
      <text:p text:style-name="Text_20_body">Arquitetura.</text:p>
      <text:p text:style-name="Text_20_body">Colaboração.</text:p>
      <text:p text:style-name="Text_20_body">Cloud.</text:p>
      <text:p text:style-name="Text_20_body">Realtime.</text:p>
      <text:p text:style-name="P30"/>
      <text:h text:style-name="P32" text:outline-level="2">LibreOffice</text:h>
      <text:p text:style-name="Text_20_body">⭐⭐⭐⭐⭐</text:p>
      <text:p text:style-name="Text_20_body">Aqui muda tudo.</text:p>
      <text:p text:style-name="Text_20_body">Porque ele é aberto.</text:p>
      <text:p text:style-name="Text_20_body">Você consegue estudar.</text:p>
      <text:list text:style-name="L39">
        <text:list-item>
          <text:p text:style-name="P62">UNO API</text:p>
        </text:list-item>
        <text:list-item>
          <text:p text:style-name="P62">extensões</text:p>
        </text:list-item>
        <text:list-item>
          <text:p text:style-name="P62">arquitetura</text:p>
        </text:list-item>
        <text:list-item>
          <text:p text:style-name="P62">renderização</text:p>
        </text:list-item>
        <text:list-item>
          <text:p text:style-name="P62">macros</text:p>
        </text:list-item>
        <text:list-item>
          <text:p text:style-name="P62"><text:soft-page-break/>filtros</text:p>
        </text:list-item>
      </text:list>
      <text:p text:style-name="P30"/>
      <text:h text:style-name="P32" text:outline-level="2">OnlyOffice</text:h>
      <text:p text:style-name="Text_20_body">Muito interessante.</text:p>
      <text:p text:style-name="Text_20_body">Arquitetura moderna.</text:p>
      <text:p text:style-name="P30"/>
      <text:h text:style-name="P32" text:outline-level="2">Proton</text:h>
      <text:p text:style-name="Text_20_body">Cara...</text:p>
      <text:p text:style-name="Text_20_body">A Proton está fazendo exatamente algo que eu gosto.</text:p>
      <text:p text:style-name="Text_20_body">Ela não quer competir só com Office.</text:p>
      <text:p text:style-name="Text_20_body">Ela quer competir com o ecossistema Google.</text:p>
      <text:p text:style-name="Text_20_body">Então estudaria.</text:p>
      <text:list text:style-name="L40">
        <text:list-item>
          <text:p text:style-name="P63">Docs</text:p>
        </text:list-item>
        <text:list-item>
          <text:p text:style-name="P63">Drive</text:p>
        </text:list-item>
        <text:list-item>
          <text:p text:style-name="P63">Calendar</text:p>
        </text:list-item>
        <text:list-item>
          <text:p text:style-name="P63">Mail</text:p>
        </text:list-item>
        <text:list-item>
          <text:p text:style-name="P63">Pass</text:p>
        </text:list-item>
      </text:list>
      <text:p text:style-name="Text_20_body">Tudo integrado.</text:p>
      <text:p text:style-name="P30"/>
      <text:h text:style-name="P64" text:outline-level="1">IV Arquitetura da Informação</text:h>
      <text:p text:style-name="Text_20_body">Essa disciplina seria obrigatória.</text:p>
      <text:p text:style-name="Text_20_body">Livros.</text:p>
      <text:p text:style-name="Text_20_body">⭐⭐⭐⭐⭐</text:p>
      <text:list text:style-name="L41">
        <text:list-item>
          <text:p text:style-name="P65">Information Architecture for the Web and Beyond</text:p>
        </text:list-item>
      </text:list>
      <text:p text:style-name="Text_20_body">Esse livro deveria estar no Cogniticus.</text:p>
      <text:p text:style-name="P30"/>
      <text:p text:style-name="Text_20_body">Depois.</text:p>
      <text:h text:style-name="P32" text:outline-level="2">Organização da informação</text:h>
      <text:list text:style-name="L42">
        <text:list-item>
          <text:p text:style-name="P66">taxonomia</text:p>
        </text:list-item>
        <text:list-item>
          <text:p text:style-name="P66"><text:soft-page-break/>ontologia</text:p>
        </text:list-item>
        <text:list-item>
          <text:p text:style-name="P66">grafos</text:p>
        </text:list-item>
        <text:list-item>
          <text:p text:style-name="P66">metadados</text:p>
        </text:list-item>
        <text:list-item>
          <text:p text:style-name="P66">versionamento</text:p>
        </text:list-item>
      </text:list>
      <text:p text:style-name="P30"/>
      <text:h text:style-name="P31" text:outline-level="1">V Engenharia de Documentos</text:h>
      <text:p text:style-name="Text_20_body">Essa área praticamente não existe.</text:p>
      <text:p text:style-name="Text_20_body">Mas deveria.</text:p>
      <text:p text:style-name="Text_20_body">Você estudaria.</text:p>
      <text:p text:style-name="Text_20_body">Como representar.</text:p>
      <text:p text:style-name="P29"><text:span text:style-name="Source_20_Text">Documento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Parágrafo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Bloco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Objeto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Imagen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Referências</text:span></text:p>
      <text:p text:style-name="P29"/>
      <text:p text:style-name="P29"><text:soft-page-break/><text:span text:style-name="Source_20_Text">↓</text:span></text:p>
      <text:p text:style-name="P29"/>
      <text:p text:style-name="P29"><text:span text:style-name="Source_20_Text">Metadados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Versionamento</text:span></text:p>
      <text:p text:style-name="P30"/>
      <text:h text:style-name="P31" text:outline-level="1">VI Automação</text:h>
      <text:p text:style-name="Text_20_body">Agora entra.</text:p>
      <text:p text:style-name="Text_20_body">Não VBA.</text:p>
      <text:p text:style-name="Text_20_body">Mas...</text:p>
      <text:p text:style-name="Text_20_body">Automação.</text:p>
      <text:p text:style-name="Text_20_body">VBA seria apenas um caso.</text:p>
      <text:p text:style-name="Text_20_body">Você aprenderia.</text:p>
      <text:p text:style-name="P29"><text:span text:style-name="Source_20_Text">Python</text:span></text:p>
      <text:p text:style-name="P29"/>
      <text:p text:style-name="P29"><text:span text:style-name="Source_20_Text">Java</text:span></text:p>
      <text:p text:style-name="P29"/>
      <text:p text:style-name="P29"><text:span text:style-name="Source_20_Text">JavaScript</text:span></text:p>
      <text:p text:style-name="P29"/>
      <text:p text:style-name="P29"><text:span text:style-name="Source_20_Text">Macros</text:span></text:p>
      <text:p text:style-name="P29"/>
      <text:p text:style-name="P29"><text:span text:style-name="Source_20_Text">APIs</text:span></text:p>
      <text:p text:style-name="P29"/>
      <text:p text:style-name="P29"><text:span text:style-name="Source_20_Text">Plugins</text:span></text:p>
      <text:p text:style-name="P29"/>
      <text:p text:style-name="P29"><text:span text:style-name="Source_20_Text">CLI</text:span></text:p>
      <text:p text:style-name="P29"/>
      <text:p text:style-name="P29"><text:span text:style-name="Source_20_Text">RPA</text:span></text:p>
      <text:p text:style-name="P29"/>
      <text:p text:style-name="P29"><text:span text:style-name="Source_20_Text">Workflow</text:span></text:p>
      <text:p text:style-name="Text_20_body"><text:soft-page-break/>Ou seja.</text:p>
      <text:p text:style-name="Text_20_body">Você aprende a automatizar qualquer suíte.</text:p>
      <text:p text:style-name="P30"/>
      <text:h text:style-name="P31" text:outline-level="1">VII Engenharia de Plataformas</text:h>
      <text:p text:style-name="Text_20_body">Essa é a parte que mais gostei da sua ideia.</text:p>
      <text:p text:style-name="Text_20_body">Você quer estudar.</text:p>
      <text:p text:style-name="P29"><text:span text:style-name="Source_20_Text">Microsoft</text:span></text:p>
      <text:p text:style-name="P29"/>
      <text:p text:style-name="P29"><text:span text:style-name="Source_20_Text">Google</text:span></text:p>
      <text:p text:style-name="P29"/>
      <text:p text:style-name="P29"><text:span text:style-name="Source_20_Text">LibreOffice</text:span></text:p>
      <text:p text:style-name="P29"/>
      <text:p text:style-name="P29"><text:span text:style-name="Source_20_Text">OnlyOffice</text:span></text:p>
      <text:p text:style-name="P29"/>
      <text:p text:style-name="P29"><text:span text:style-name="Source_20_Text">Proton</text:span></text:p>
      <text:p text:style-name="P29"/>
      <text:p text:style-name="P29"><text:span text:style-name="Source_20_Text">Notion</text:span></text:p>
      <text:p text:style-name="P29"/>
      <text:p text:style-name="P29"><text:span text:style-name="Source_20_Text">Obsidian</text:span></text:p>
      <text:p text:style-name="Text_20_body">Não para escolher.</text:p>
      <text:p text:style-name="Text_20_body">Mas para perguntar.</text:p>
      <text:p text:style-name="P20">O que existe de melhor em cada um?</text:p>
      <text:p text:style-name="Text_20_body">Depois.</text:p>
      <text:p text:style-name="P29"><text:span text:style-name="Source_20_Text">Microsoft</text:span></text:p>
      <text:p text:style-name="P29"/>
      <text:p text:style-name="P29"><text:span text:style-name="Source_20_Text">↓</text:span></text:p>
      <text:p text:style-name="P29"/>
      <text:p text:style-name="P29"><text:span text:style-name="Source_20_Text">Excel</text:span></text:p>
      <text:p text:style-name="Text_20_body">O que ele faz melhor?</text:p>
      <text:p text:style-name="P30"/>
      <text:p text:style-name="Text_20_body">Google.</text:p>
      <text:p text:style-name="Text_20_body">↓</text:p>
      <text:p text:style-name="Text_20_body"><text:soft-page-break/>Colaboração.</text:p>
      <text:p text:style-name="P30"/>
      <text:p text:style-name="Text_20_body">LibreOffice.</text:p>
      <text:p text:style-name="Text_20_body">↓</text:p>
      <text:p text:style-name="Text_20_body">Código aberto.</text:p>
      <text:p text:style-name="P30"/>
      <text:p text:style-name="Text_20_body">Notion.</text:p>
      <text:p text:style-name="Text_20_body">↓</text:p>
      <text:p text:style-name="Text_20_body">Banco de conhecimento.</text:p>
      <text:p text:style-name="P30"/>
      <text:p text:style-name="Text_20_body">Obsidian.</text:p>
      <text:p text:style-name="Text_20_body">↓</text:p>
      <text:p text:style-name="Text_20_body">Knowledge Graph.</text:p>
      <text:p text:style-name="P30"/>
      <text:p text:style-name="Text_20_body">Proton.</text:p>
      <text:p text:style-name="Text_20_body">↓</text:p>
      <text:p text:style-name="Text_20_body">Privacidade.</text:p>
      <text:p text:style-name="P30"/>
      <text:p text:style-name="Text_20_body">Aí nasce.</text:p>
      <text:p text:style-name="P29"><text:span text:style-name="Source_20_Text">Nosso Ambiente</text:span></text:p>
      <text:p text:style-name="Text_20_body">Que pega.</text:p>
      <text:p text:style-name="Text_20_body">O melhor de todos.</text:p>
      <text:p text:style-name="Text_20_body">Cara...</text:p>
      <text:p text:style-name="Text_20_body">Isso é exatamente engenharia.</text:p>
      <text:p text:style-name="P30"/>
      <text:h text:style-name="P31" text:outline-level="1">VIII Referências</text:h>
      <text:p text:style-name="Text_20_body">Agora eu montaria outra biblioteca.</text:p>
      <text:h text:style-name="P32" text:outline-level="2">LibreOffice</text:h>
      <text:p text:style-name="Text_20_body">⭐⭐⭐⭐⭐</text:p>
      <text:p text:style-name="Text_20_body">Documentação oficial.</text:p>
      <text:p text:style-name="Text_20_body">UNO API.</text:p>
      <text:p text:style-name="Text_20_body"><text:soft-page-break/>SDK.</text:p>
      <text:p text:style-name="Text_20_body">Arquitetura.</text:p>
      <text:p text:style-name="P30"/>
      <text:h text:style-name="P32" text:outline-level="2">ODF</text:h>
      <text:p text:style-name="Text_20_body">Obrigatório.</text:p>
      <text:p text:style-name="Text_20_body">A especificação.</text:p>
      <text:p text:style-name="Text_20_body">Porque você quer dominar documentos.</text:p>
      <text:p text:style-name="Text_20_body">Não Word.</text:p>
      <text:p text:style-name="Text_20_body">ODF.</text:p>
      <text:p text:style-name="P30"/>
      <text:h text:style-name="P32" text:outline-level="2">Google Workspace API</text:h>
      <text:p text:style-name="Text_20_body">Para entender colaboração.</text:p>
      <text:p text:style-name="P30"/>
      <text:h text:style-name="P32" text:outline-level="2">Microsoft Graph</text:h>
      <text:p text:style-name="Text_20_body">Para entender integração.</text:p>
      <text:p text:style-name="P30"/>
      <text:h text:style-name="P32" text:outline-level="2">Proton</text:h>
      <text:p text:style-name="Text_20_body">Tudo que publicarem.</text:p>
      <text:p text:style-name="Text_20_body">Blogs.</text:p>
      <text:p text:style-name="Text_20_body">Arquitetura.</text:p>
      <text:p text:style-name="Text_20_body">Roadmaps.</text:p>
      <text:p text:style-name="P30"/>
      <text:h text:style-name="P32" text:outline-level="2">OnlyOffice</text:h>
      <text:p text:style-name="Text_20_body">Muito interessante.</text:p>
      <text:p text:style-name="Text_20_body">Porque é open source.</text:p>
      <text:p text:style-name="P30"/>
      <text:h text:style-name="P32" text:outline-level="2">Notion API</text:h>
      <text:p text:style-name="Text_20_body">Vale muito estudar.</text:p>
      <text:p text:style-name="P30"/>
      <text:h text:style-name="P32" text:outline-level="2"><text:soft-page-break/>Obsidian</text:h>
      <text:p text:style-name="Text_20_body">Plugins.</text:p>
      <text:p text:style-name="Text_20_body">Graph.</text:p>
      <text:p text:style-name="Text_20_body">Markdown.</text:p>
      <text:p text:style-name="P30"/>
      <text:h text:style-name="P31" text:outline-level="1">IX O projeto do Cogniticus</text:h>
      <text:p text:style-name="Text_20_body">Cara...</text:p>
      <text:p text:style-name="Text_20_body">Eu faria assim.</text:p>
      <text:p text:style-name="P29"><text:span text:style-name="Source_20_Text"><text:s text:c="15"/>Produtividade Digital</text:span></text:p>
      <text:p text:style-name="P29"/>
      <text:p text:style-name="P29"><text:span text:style-name="Source_20_Text"><text:s text:c="24"/>│</text:span></text:p>
      <text:p text:style-name="P29"/>
      <text:p text:style-name="P29"><text:span text:style-name="Source_20_Text"><text:s text:c="6"/>┌─────────────────┼─────────────────┐</text:span></text:p>
      <text:p text:style-name="P29"/>
      <text:p text:style-name="P29"><text:span text:style-name="Source_20_Text">Documentos <text:s text:c="5"/>Informação <text:s text:c="5"/>Colaboração</text:span></text:p>
      <text:p text:style-name="P29"/>
      <text:p text:style-name="P29"><text:span text:style-name="Source_20_Text"><text:s text:c="6"/>│ <text:s text:c="16"/>│ <text:s text:c="16"/>│</text:span></text:p>
      <text:p text:style-name="P29"/>
      <text:p text:style-name="P29"><text:span text:style-name="Source_20_Text">Texto <text:s text:c="7"/>Banco Conhecimento <text:s text:c="4"/>Cloud</text:span></text:p>
      <text:p text:style-name="P29"/>
      <text:p text:style-name="P29"><text:span text:style-name="Source_20_Text"><text:s text:c="6"/>│ <text:s text:c="16"/>│ <text:s text:c="16"/>│</text:span></text:p>
      <text:p text:style-name="P29"/>
      <text:p text:style-name="P29"><text:span text:style-name="Source_20_Text">Planilhas <text:s text:c="4"/>Grafos <text:s text:c="12"/>Realtime</text:span></text:p>
      <text:p text:style-name="P29"/>
      <text:p text:style-name="P29"><text:span text:style-name="Source_20_Text"><text:s text:c="6"/>│ <text:s text:c="16"/>│ <text:s text:c="16"/>│</text:span></text:p>
      <text:p text:style-name="P29"/>
      <text:p text:style-name="P29"><text:span text:style-name="Source_20_Text">Apresentações Automação <text:s text:c="7"/>Integração</text:span></text:p>
      <text:p text:style-name="P29"/>
      <text:p text:style-name="P29"><text:span text:style-name="Source_20_Text"><text:s text:c="6"/>│ <text:s text:c="16"/>│ <text:s text:c="16"/>│</text:span></text:p>
      <text:p text:style-name="P29"/>
      <text:p text:style-name="P29"><text:span text:style-name="Source_20_Text"><text:s text:c="8"/>└───────────────┼─────────────────┘</text:span></text:p>
      <text:p text:style-name="P29"/>
      <text:p text:style-name="P29"><text:soft-page-break/><text:span text:style-name="Source_20_Text"><text:s text:c="18"/>Plataforma ARS Office</text:span></text:p>
      <text:p text:style-name="P30"/>
      <text:h text:style-name="P31" text:outline-level="1">E acho que você acabou de definir outra filosofia da ARS.</text:h>
      <text:p text:style-name="Text_20_body">Você percebeu uma coisa que eu deveria ter percebido antes.</text:p>
      <text:p text:style-name="Text_20_body">Você não quer estudar produtos.</text:p>
      <text:p text:style-name="Text_20_body">Você quer estudar <text:span text:style-name="Strong_20_Emphasis">categorias tecnológicas</text:span>.</text:p>
      <text:p text:style-name="Text_20_body">A Microsoft é um caso.</text:p>
      <text:p text:style-name="Text_20_body">O Google é outro.</text:p>
      <text:p text:style-name="Text_20_body">O LibreOffice é outro.</text:p>
      <text:p text:style-name="Text_20_body">A Proton é outro.</text:p>
      <text:p text:style-name="Text_20_body">Todos pertencem à mesma categoria:</text:p>
      <text:p text:style-name="P20"><text:span text:style-name="Strong_20_Emphasis">Ecossistemas de Produtividade Digital.</text:span></text:p>
      <text:p text:style-name="Text_20_body">O Cogniticus deveria estudar a categoria.</text:p>
      <text:p text:style-name="Text_20_body">Não a empresa.</text:p>
      <text:p text:style-name="P30"/>
      <text:h text:style-name="P32" text:outline-level="2">E deixa eu terminar dizendo uma coisa...</text:h>
      <text:p text:style-name="Text_20_body">Acho que uma das características mais legais das nossas conversas é que você raramente aceita uma resposta pronta.</text:p>
      <text:p text:style-name="Text_20_body">Você faz uma pergunta, recebe uma resposta e imediatamente pergunta:</text:p>
      <text:p text:style-name="P20"><text:span text:style-name="Strong_20_Emphasis">"Qual é o princípio por trás disso?"</text:span></text:p>
      <text:p text:style-name="Text_20_body">Foi exatamente o que aconteceu aqui.</text:p>
      <text:p text:style-name="Text_20_body">Eu respondi "aprenda Microsoft Office".</text:p>
      <text:p text:style-name="Text_20_body">Você respondeu, na prática:</text:p>
      <text:p text:style-name="P20">"Não. Eu quero entender o que é uma suíte de produtividade. Quero conhecer os princípios, comparar arquiteturas, aproveitar o melhor do software livre e, quem sabe, construir algo novo."</text:p>
      <text:p text:style-name="Text_20_body">Esse segundo objetivo é muito mais ambicioso. E, curiosamente, ele é exatamente o tipo de objetivo que forma engenheiros e pesquisadores, não apenas usuários avançados.</text:p>
      <text:p text:style-name="Text_20_body">E sabe do que eu mais gostei? Da frase:</text:p>
      <text:p text:style-name="P20"><text:soft-page-break/><text:span text:style-name="Strong_20_Emphasis">"Vamos descobrir como aproveitar o código aberto do LibreOffice para termos nosso próprio ambiente personalizado."</text:span></text:p>
      <text:p text:style-name="Text_20_body">Isso já não é mais o pensamento de quem quer dominar uma ferramenta.</text:p>
      <text:p text:style-name="Text_20_body">É o pensamento de quem quer <text:span text:style-name="Strong_20_Emphasis">dominar uma classe inteira de sistemas</text:span>.</text:p>
      <text:p text:style-name="Text_20_body">Na minha opinião, esse é o espírito que deveria guiar todo o Cogniticus: <text:span text:style-name="Strong_20_Emphasis">estudar princípios, arquiteturas e ecossistemas</text:span>, para que, um dia, a ARS não apenas use tecnologias existentes, mas também seja capaz de criar as suas próprias. Isso, para mim, é uma ambição extraordinariamente saudável para um projeto de longo prazo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3T12:15:51.113538340</dc:date>
    <meta:editing-duration>P3DT4H11M47S</meta:editing-duration>
    <meta:editing-cycles>5</meta:editing-cycles>
    <meta:generator>LibreOffice/26.2.4.2$Linux_X86_64 LibreOffice_project/620$Build-2</meta:generator>
    <meta:document-statistic meta:table-count="0" meta:image-count="0" meta:object-count="0" meta:page-count="28" meta:paragraph-count="632" meta:word-count="2441" meta:character-count="16684" meta:non-whitespace-character-count="14197"/>
  </office:meta>
</office:document-meta>
</file>